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4e08"/>
    </style:style>
    <style:style style:name="P2" style:family="paragraph" style:parent-style-name="Standard">
      <style:text-properties officeooo:rsid="000f4e08" officeooo:paragraph-rsid="000f4e08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ab99" officeooo:paragraph-rsid="0010ab99" style:font-weight-asian="bold" style:font-weight-complex="bold"/>
    </style:style>
    <style:style style:name="P5" style:family="paragraph" style:parent-style-name="Standard">
      <style:text-properties fo:font-weight="bold" officeooo:paragraph-rsid="0010ab99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f4e08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italic" fo:font-weight="normal"/>
    </style:style>
    <style:style style:name="P9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italic" fo:font-weight="normal" officeooo:paragraph-rsid="000f4e08"/>
    </style:style>
    <style:style style:name="P10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italic" fo:font-weight="normal" officeooo:paragraph-rsid="000f4e08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italic" fo:font-weight="normal" officeooo:paragraph-rsid="000f4e08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italic" fo:font-weight="normal" officeooo:paragraph-rsid="0010ab99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italic" fo:font-weight="normal" officeooo:rsid="0010a201" officeooo:paragraph-rsid="0010a201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italic" fo:font-weight="normal" officeooo:rsid="0010ab99" officeooo:paragraph-rsid="0010ab99"/>
    </style:style>
    <style:style style:name="T1" style:family="text">
      <style:text-properties officeooo:rsid="000f4e08"/>
    </style:style>
    <style:style style:name="T2" style:family="text">
      <style:text-properties fo:font-weight="normal"/>
    </style:style>
    <style:style style:name="T3" style:family="text">
      <style:text-properties fo:font-weight="normal" officeooo:rsid="0010a201"/>
    </style:style>
    <style:style style:name="T4" style:family="text">
      <style:text-properties fo:font-variant="normal" fo:text-transform="none" fo:color="#222222" loext:opacity="100%" style:font-name="Arial" fo:font-size="12pt" fo:letter-spacing="normal" fo:font-style="italic" fo:font-weight="normal"/>
    </style:style>
    <style:style style:name="T5" style:family="text">
      <style:text-properties fo:font-variant="normal" fo:text-transform="none" fo:color="#222222" loext:opacity="100%" style:font-name="Arial" fo:font-size="12pt" fo:letter-spacing="normal" fo:font-style="italic" fo:font-weight="normal" officeooo:rsid="000f4e08"/>
    </style:style>
    <style:style style:name="T6" style:family="text">
      <style:text-properties fo:font-variant="normal" fo:text-transform="none" fo:color="#222222" loext:opacity="100%" style:font-name="Arial" fo:font-size="12pt" fo:letter-spacing="normal" fo:font-style="italic" fo:font-weight="normal" officeooo:rsid="0010a201"/>
    </style:style>
    <style:style style:name="T7" style:family="text">
      <style:text-properties officeooo:rsid="0010a20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ROMPT-1</text:p>
      <text:p text:style-name="Standard"/>
      <text:p text:style-name="P6"># Jurisdiction update GenAI POC at GLI (Gaming Laboratories International)</text:p>
      <text:p text:style-name="P6"/>
      <text:p text:style-name="P6">I need to do the research on `Regology[https://www.regology.com/ ]` website that already doing the same task (Regulatory change monitoring):</text:p>
      <text:p text:style-name="P6">~ Detect that the regulation has changed</text:p>
      <text:p text:style-name="P6">~ Understand what specifically changed and what it means</text:p>
      <text:p text:style-name="P6">~ Update the relevant content in GLIAccess — certification requirements, submission templates, documentation, test criteria — for that jurisdiction</text:p>
      <text:p text:style-name="P6">~ Notify the right stakeholders (GLI Staff, relevant operators, regulators)</text:p>
      <text:p text:style-name="P6"/>
      <text:p text:style-name="P6">Regology is already doing a version of this specifically for the gaming industry.</text:p>
      <text:p text:style-name="Text_20_body"/>
      <text:p text:style-name="P6">Research Task (The primary tasks are):</text:p>
      <text:p text:style-name="P6">1. Research on the Regology tool.</text:p>
      <text:p text:style-name="P6">2. What features it offers</text:p>
      <text:p text:style-name="P6">3. Price it offers</text:p>
      <text:p text:style-name="P6">4. Underlying technology/ architecture it is working on. </text:p>
      <text:p text:style-name="P6">5. What are the features offered, list out those features?</text:p>
      <text:p text:style-name="P6">6. How are those features working, list the steps?</text:p>
      <text:p text:style-name="P6">7. What extra features do you suggest that will create business value?</text:p>
      <text:p text:style-name="P6">8. List out the extra features with working ideas or steps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p text:style-name="P4">PROMPT-2</text:p>
      <text:p text:style-name="Standard"/>
      <text:p text:style-name="P8"><text:span text:style-name="Strong_20_Emphasis"><text:span text:style-name="T3"># optimize the below user prompt </text:span></text:span><text:span text:style-name="Strong_20_Emphasis"><text:span text:style-name="T2"><text:line-break/></text:span></text:span></text:p>
      <text:p text:style-name="P2"><text:span text:style-name="T7">```<text:line-break/></text:span>I have attach the section “<text:span text:style-name="Strong_20_Emphasis"><text:span text:style-name="T4">What the use case actually is?” in below.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>You do not use the existing `client_requirement.txt`file.</text:span></text:span></text:p>
      <text:p text:style-name="P2"/>
      <text:p text:style-name="Standard">Now you have to generate new `refined_client_requirement` inside the @research/ </text:p>
      <text:p text:style-name="Standard">folder with all the identified details from the @research/regology_research.md .</text:p>
      <text:p text:style-name="P1">The new `refined_client_requirement` document will be presented to `sales`, `business` and `tech` team. <text:span text:style-name="T7">If you think to create `csv` file to present, please create separate csv file with best naming column.</text:span></text:p>
      <text:p text:style-name="P1"/>
      <text:p text:style-name="P1"><text:span text:style-name="T1">B</text:span>ased on th<text:span text:style-name="T1">e</text:span> new document, we will craete working POC.</text:p>
      <text:p text:style-name="P1"/>
      <text:p text:style-name="Standard">The POC time will be 2-3 days:</text:p>
      <text:p text:style-name="Standard">~ we need to show all the use cases with features lists (table format with business impact )</text:p>
      <text:p text:style-name="Standard">~ target to complete business value feature <text:span text:style-name="T7">first </text:span>so that we can make an impact on business leaders</text:p>
      <text:p text:style-name="Standard">~ include all primary tasks (already given) <text:span text:style-name="T7">if you think that can help you to re-define the solution</text:span></text:p>
      <text:p text:style-name="Standard">~ if you think to refine the process please look into it as well.</text:p>
      <text:p text:style-name="Standard"/>
      <text:p text:style-name="Standard"/>
      <text:p text:style-name="P7"><text:span text:style-name="Strong_20_Emphasis"><text:span text:style-name="T5"># </text:span></text:span><text:span text:style-name="Strong_20_Emphasis"><text:span text:style-name="T4">What the use case actually is?</text:span></text:span></text:p>
      <text:p text:style-name="P11">GLI operates across 710+ jurisdictions. Each jurisdiction has its own regulatory standards — technical requirements for gaming devices, software certification rules, submission formats, documentation standards. When a jurisdiction updates its regulations (e.g., New South Wales changes its slot machine technical standards, or a new US state legalises sports betting with specific requirements), GLI needs to:</text:p>
      <text:list text:style-name="L1">
        <text:list-item>
          <text:p text:style-name="P9">Detect that the regulation has changed</text:p>
        </text:list-item>
        <text:list-item>
          <text:p text:style-name="P9">Understand what specifically changed and what it means</text:p>
        </text:list-item>
        <text:list-item>
          <text:p text:style-name="P9">Update the relevant content in GLIAccess — certification requirements, submission templates, documentation, test criteria — for that jurisdiction</text:p>
        </text:list-item>
        <text:list-item>
          <text:p text:style-name="P10">Notify the right stakeholders (GLI Staff, relevant operators, regulators)</text:p>
        </text:list-item>
      </text:list>
      <text:p text:style-name="P11">Right now this is almost certainly a manual process. Someone monitors regulatory sources, reads the change, interprets it, and manually updates GLIAccess content. At 710+ jurisdictions, even if only 5–10% of them update regulations in a given quarter, that's 35–70 manual change events that each require reading, interpreting, and updating.</text:p>
      <text:p text:style-name="P13">```</text:p>
      <text:p text:style-name="P13"/>
      <text:p text:style-name="P13"/>
      <text:p text:style-name="P13"/>
      <text:p text:style-name="P13"/>
      <text:p text:style-name="P13"><text:soft-page-break/></text:p>
      <text:p text:style-name="P13">Optimized:</text:p>
      <text:p text:style-name="P13"/>
      <text:p text:style-name="P13"/>
      <text:p text:style-name="P13"># Task</text:p>
      <text:p text:style-name="P13"/>
      <text:p text:style-name="P13">Create a new stakeholder-facing requirement document at `research/refined_client_requirement.md` (and an optional companion CSV — see "Deliverables" below) that consolidates the GLI use case described in **"Use case context"** with the implementation insights already gathered in `research/regology_research.md`.</text:p>
      <text:p text:style-name="P13"/>
      <text:p text:style-name="P13">This document will be presented jointly to **Sales**, **Business**, and **Tech** teams. After they sign off, we will use it to build a working POC.</text:p>
      <text:p text:style-name="P13"/>
      <text:p text:style-name="P13"># Sources of truth (strict)</text:p>
      <text:p text:style-name="P13"/>
      <text:p text:style-name="P13">- **DO use:** `research/regology_research.md` — for features, business impact framing, technical refinements, risks, and the "extra features" catalog.</text:p>
      <text:p text:style-name="P13">- **DO use:** the **"Use case context"** section below — this is the canonical statement of the problem.</text:p>
      <text:p text:style-name="P13">- **DO NOT use:** `client_requirement.txt`. Treat it as deprecated. If a primary task from your prior knowledge of that file genuinely sharpens the solution, you may reference it as a "carried-forward task," but the new document must stand on its own.</text:p>
      <text:p text:style-name="P13"/>
      <text:p text:style-name="P13"># Deliverables</text:p>
      <text:p text:style-name="P13"/>
      <text:p text:style-name="P13">1. **Required:** `research/refined_client_requirement.md`</text:p>
      <text:p text:style-name="P13">2. **Recommended:** a separate companion CSV (e.g., `research/refined_client_requirement_features.csv`) with the full feature list. Choose column names that work for all three audiences — at minimum: `use_case`, `feature`, `description`, `business_impact`, `priority` (must / should / stretch), `poc_in_2_3_days` (yes/no), `effort_S_M_L`, `dependencies`, `notes`. Adjust if you have a better column set; justify briefly in the doc.</text:p>
      <text:p text:style-name="P13"/>
      <text:p text:style-name="P13"># Document requirements</text:p>
      <text:p text:style-name="P13"><text:soft-page-break/></text:p>
      <text:p text:style-name="P13">- **Audience tone:** executive-readable for Sales/Business; precise enough for Tech to scope build work.</text:p>
      <text:p text:style-name="P13">- **Show all use cases** identified for GLI (regulatory change monitoring is the spine; include any adjacent use cases surfaced by the research that move business needles).</text:p>
      <text:p text:style-name="P13">- For **each use case**, include:</text:p>
      <text:p text:style-name="P13"><text:s text:c="2"/>- One-paragraph objective.</text:p>
      <text:p text:style-name="P13"><text:s text:c="2"/>- **Feature table** in markdown with columns: `Feature | Description | Business Impact | POC depth (2–3 days)`.</text:p>
      <text:p text:style-name="P13"><text:s text:c="2"/>- Numbered end-to-end flow (trigger → outcome).</text:p>
      <text:p text:style-name="P13">- A **cross-cutting requirements** section (HITL, citations, audit trail, source-health, security posture).</text:p>
      <text:p text:style-name="P13">- A **risks &amp; mitigations** section (concise).</text:p>
      <text:p text:style-name="P13">- A **roadmap** section that clearly separates POC scope from post-POC scope.</text:p>
      <text:p text:style-name="P13"/>
      <text:p text:style-name="P13"># POC scope (hard constraint: 2–3 days)</text:p>
      <text:p text:style-name="P13"/>
      <text:p text:style-name="P13">- Sequence work so the **highest business-value features land first** — the goal is a demo that creates impact with business leaders, not feature completeness.</text:p>
      <text:p text:style-name="P13">- Provide an explicit **Day 1 / Day 2 / Day 3** plan with a measurable outcome per day.</text:p>
      <text:p text:style-name="P13">- Provide a one-page **demo script** that walks all in-scope use cases as a single narrative.</text:p>
      <text:p text:style-name="P13">- Mark every feature as `must` / `should` / `stretch` so we can cut from the bottom under time pressure.</text:p>
      <text:p text:style-name="P13"/>
      <text:p text:style-name="P13"># Process refinements (encouraged)</text:p>
      <text:p text:style-name="P13"/>
      <text:p text:style-name="P13">If the research suggests a better process than the obvious "scrape → embed-diff → review → push" pipeline (e.g., clause-level structural diff, LLM relevance scoring before review, mandatory citations, audit log, standards-mapping graph, horizon scanning), incorporate it — but only adopt items that fit inside or directly enable the 2–3 day POC. Push everything else to the roadmap with effort tier (S/M/L) and a one-line justification.</text:p>
      <text:p text:style-name="P13"/>
      <text:p text:style-name="P13"># Acceptance criteria</text:p>
      <text:p text:style-name="P13"/>
      <text:p text:style-name="P13"><text:soft-page-break/>- All four steps in **"Use case context"** are explicitly addressed in at least one use case section.</text:p>
      <text:p text:style-name="P13">- Every feature has a **business impact** statement written for a non-technical reader.</text:p>
      <text:p text:style-name="P13">- POC scope is unambiguous: a Tech reader can start building Day 1 from this doc alone.</text:p>
      <text:p text:style-name="P13">- Sales/Business reader can pitch the value in &lt;2 minutes from the executive summary + feature tables.</text:p>
      <text:p text:style-name="P13">- The CSV (if produced) is row-aligned with the markdown tables and is referenced from the doc.</text:p>
      <text:p text:style-name="P13"/>
      <text:p text:style-name="P13">---</text:p>
      <text:p text:style-name="P13"/>
      <text:p text:style-name="P13"># Use case context (authoritative problem statement)</text:p>
      <text:p text:style-name="P13"/>
      <text:p text:style-name="P13">GLI operates across **710+ jurisdictions**. Each jurisdiction maintains its own regulatory standards — technical requirements for gaming devices, software certification rules, submission formats, and documentation standards. When a jurisdiction updates its regulations (e.g., New South Wales revises its slot-machine technical standards, or a new US state legalizes sports betting with specific requirements), GLI must:</text:p>
      <text:p text:style-name="P13"/>
      <text:p text:style-name="P13">1. **Detect** that the regulation has changed.</text:p>
      <text:p text:style-name="P13">2. **Understand** what specifically changed and what it means.</text:p>
      <text:p text:style-name="P13">3. **Update** the relevant content in **GLIAccess** — certification requirements, submission templates, documentation, test criteria — for that jurisdiction.</text:p>
      <text:p text:style-name="P13">4. **Notify** the right stakeholders: GLI staff, relevant operators, and regulators.</text:p>
      <text:p text:style-name="P13"/>
      <text:p text:style-name="P13">Today this is almost entirely a manual process: a person monitors regulatory sources, reads the change, interprets it, and manually updates GLIAccess content. At 710+ jurisdictions, even if only 5–10% update regulations in a given quarter, that's **35–70 manual change events per quarter**, each requiring reading, interpretation, and content updates downstream. The POC must demonstrate a credible automation path for this loop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5"/>
      <text:p text:style-name="P4">PROMPT-3</text:p>
      <text:p text:style-name="P4"/>
      <text:p text:style-name="P12"><text:span text:style-name="Strong_20_Emphasis"><text:span text:style-name="T3"># optimize the below user prompt</text:span></text:span></text:p>
      <text:p text:style-name="P14">Lets create a technical low-level architecture diagram with proposed tool and technology for POC.</text:p>
      <text:p text:style-name="P14"/>
      <text:p text:style-name="P14"/>
      <text:p text:style-name="P14">Optimized:</text:p>
      <text:p text:style-name="P14"/>
      <text:p text:style-name="P14"># Task</text:p>
      <text:p text:style-name="P14"/>
      <text:p text:style-name="P14">Create a **low-level technical architecture diagram** (with concrete proposed tools and technologies) for the **2–3 day POC** described in [`research/refined_client_requirement.md`](research/refined_client_requirement.md). The output must be a single new markdown document at **`research/poc_low_level_architecture.md`** that the Tech team can use to start Day 1 implementation without further clarification, and that Sales/Business can read for system-level confidence.</text:p>
      <text:p text:style-name="P14"/>
      <text:p text:style-name="P14"># Sources of truth (strict)</text:p>
      <text:p text:style-name="P14"/>
      <text:p text:style-name="P14">- **DO use:**</text:p>
      <text:p text:style-name="P14"><text:s text:c="2"/>- [`research/refined_client_requirement.md`](research/refined_client_requirement.md) — feature IDs (UC1-001 … UC1-010, UC2-*, UC3-*, XC-*), priorities (must / should / stretch), Day 1–3 plan, demo script.</text:p>
      <text:p text:style-name="P14"><text:s text:c="2"/>- [`research/refined_client_requirement_features.csv`](research/refined_client_requirement_features.csv) — feature catalog (use it to ensure every **must** / **should** feature appears in the architecture; clearly mark **stretch** items as dashed/optional).</text:p>
      <text:p text:style-name="P14"><text:s text:c="2"/>- [`research/regology_research.md`](research/regology_research.md) — for technical pattern references only (do not duplicate its content).</text:p>
      <text:p text:style-name="P14"><text:s text:c="2"/>- Existing repo signals: [`docker-compose.yml`](docker-compose.yml), [`n8n_workflow.json`](n8n_workflow.json), [`README.md`](README.md), [`resources.txt`](resources.txt), [`ui/`](ui/) — the diagram must align with what is already provisioned (n8n, Qdrant, etc.).</text:p>
      <text:p text:style-name="P14">- **DO NOT use:** `client_requirement.txt` (deprecated).</text:p>
      <text:p text:style-name="P14"><text:soft-page-break/></text:p>
      <text:p text:style-name="P14"># Deliverables</text:p>
      <text:p text:style-name="P14"/>
      <text:p text:style-name="P14">1. **Required:** `research/poc_low_level_architecture.md` containing:</text:p>
      <text:p text:style-name="P14"><text:s text:c="3"/>- **Component inventory table** — `component | role | proposed tool/tech | why this choice (1 line) | feature_ids it serves | priority`.</text:p>
      <text:p text:style-name="P14"><text:s text:c="3"/>- **Primary low-level diagram** (mermaid `flowchart`) showing all components, data flows, retries, and HITL gates for **UC1**.</text:p>
      <text:p text:style-name="P14"><text:s text:c="3"/>- **Sequence diagrams** (mermaid `sequenceDiagram`) for the three demo-critical flows: (a) Detect → Diff → Relevance, (b) HITL approve → Draft → SharePoint MCP push, (c) UC2 cited Q&amp;A.</text:p>
      <text:p text:style-name="P14"><text:s text:c="3"/>- **Data model sketch** — list of stores (Postgres tables / Qdrant collections / object storage / files) with field hints.</text:p>
      <text:p text:style-name="P14"><text:s text:c="3"/>- **Configuration &amp; secrets surface** — env vars, secret names, and where they're consumed (no real secrets).</text:p>
      <text:p text:style-name="P14"><text:s text:c="3"/>- **Day-1 boot checklist** — exact steps, ports, URLs, and commands to bring the POC up locally (build on existing `docker-compose` setup).</text:p>
      <text:p text:style-name="P14"><text:s text:c="3"/>- **Failure / retry / observability notes** — how UC1-008 idempotency, XC-003 audit trail, and XC-004 source-health are wired in.</text:p>
      <text:p text:style-name="P14"><text:s text:c="3"/>- **Open technical decisions** — short list with a recommended default for each.</text:p>
      <text:p text:style-name="P14">2. **Recommended (only if it adds clarity):** a separate `research/poc_low_level_architecture.csv` mirroring the component inventory table with the same columns.</text:p>
      <text:p text:style-name="P14"/>
      <text:p text:style-name="P14"># Diagram requirements</text:p>
      <text:p text:style-name="P14"/>
      <text:p text:style-name="P14">- All diagrams **must** use **mermaid** code blocks rendered inside the markdown.</text:p>
      <text:p text:style-name="P14">- Follow strict mermaid syntax:</text:p>
      <text:p text:style-name="P14"><text:s text:c="2"/>- No spaces in node IDs (use `camelCase` / `snake_case`).</text:p>
      <text:p text:style-name="P14"><text:s text:c="2"/>- Quote node labels containing `()`, `:`, `,`, `/`, or other special chars: `nodeId["Label (with parens)"]`.</text:p>
      <text:p text:style-name="P14"><text:s text:c="2"/>- No reserved keywords as IDs (`end`, `subgraph`, `graph`, `flowchart`).</text:p>
      <text:p text:style-name="P14"><text:s text:c="2"/>- **Do NOT** apply explicit colors or `classDef` styling — leave theme defaults so dark mode still renders.</text:p>
      <text:p text:style-name="P14"><text:s text:c="2"/>- Use **dashed edges** or `:::stretch` only via standard syntax to mark **stretch** components; otherwise rely on labels like `(stretch)`.</text:p>
      <text:p text:style-name="P14"><text:soft-page-break/><text:s text:c="2"/>- No `click` events.</text:p>
      <text:p text:style-name="P14">- Group related components using `subgraph id [Label]` blocks (e.g., `Ingestion`, `Detection`, `HITL`, `Publish`, `Notify`, `Q&amp;A`, `Storage`, `Observability`).</text:p>
      <text:p text:style-name="P14">- Show external systems explicitly: regulator sources, **SharePoint via MCP**, email/Teams webhook, LLM API.</text:p>
      <text:p text:style-name="P14">- Annotate edges with the **feature_id(s)** they realize (e.g., `|"UC1-003"|`).</text:p>
      <text:p text:style-name="P14"/>
      <text:p text:style-name="P14"># Tooling defaults to propose (state explicitly; allow swaps)</text:p>
      <text:p text:style-name="P14"/>
      <text:p text:style-name="P14">- **Orchestration:** existing **n8n** from `docker-compose.yml` (extend `n8n_workflow.json`).</text:p>
      <text:p text:style-name="P14">- **Vector store:** existing **Qdrant** (collections per `README.md`).</text:p>
      <text:p text:style-name="P14">- **Relational / metadata store:** **Postgres** (or SQLite if simpler for 2–3 days) — call out the choice.</text:p>
      <text:p text:style-name="P14">- **Object snapshots / audit blobs:** local volume for POC (S3-compatible later).</text:p>
      <text:p text:style-name="P14">- **LLM:** org-approved API for structured outputs; note self-hosted alternative.</text:p>
      <text:p text:style-name="P14">- **Embedding model:** name a specific default (e.g., a small, fast model) consistent with Qdrant collection size from `README.md`.</text:p>
      <text:p text:style-name="P14">- **Diff engine:** vector-similarity flag + a structural/text diff (name the library, e.g., `diff-match-patch` or equivalent).</text:p>
      <text:p text:style-name="P14">- **UI:** extend existing `ui/` per its current stack.</text:p>
      <text:p text:style-name="P14">- **SharePoint:** **MCP** server for read/write; document folder/drive id binding via env.</text:p>
      <text:p text:style-name="P14">- **Notifications:** Teams **incoming webhook** and SMTP (mailhog acceptable in POC).</text:p>
      <text:p text:style-name="P14">- **Audit log:** append-only Postgres table or JSONL on disk; note upgrade path.</text:p>
      <text:p text:style-name="P14"/>
      <text:p text:style-name="P14">For each, briefly justify why the choice is appropriate for a 2–3 day POC scoped to UC1 (must) + thin UC2/UC3 slices.</text:p>
      <text:p text:style-name="P14"/>
      <text:p text:style-name="P14"># Constraints</text:p>
      <text:p text:style-name="P14"/>
      <text:p text:style-name="P14">- POC must remain **bootable on a developer laptop** (no managed cloud dependencies beyond the LLM API).</text:p>
      <text:p text:style-name="P14">- Every component shown must trace back to at least one `feature_id` from the CSV; do not invent features.</text:p>
      <text:p text:style-name="P14"><text:soft-page-break/>- **HITL** (XC-001) and **mandatory citations** (XC-002) must be visible in the diagrams as explicit gates/annotations.</text:p>
      <text:p text:style-name="P14">- Keep the architecture **minimal** — prefer extending existing services over adding new ones.</text:p>
      <text:p text:style-name="P14"/>
      <text:p text:style-name="P14"># Acceptance criteria</text:p>
      <text:p text:style-name="P14"/>
      <text:p text:style-name="P14">- Tech reader can pull the repo, follow the **Day-1 boot checklist**, and have the ingest + diff path running end-to-end against a seeded NV/NY baseline.</text:p>
      <text:p text:style-name="P14">- Every **must** feature from the CSV is reachable in the primary diagram; every **should** is present (possibly annotated as such); every **stretch** is shown dashed/labeled or explicitly listed as out-of-scope-for-POC.</text:p>
      <text:p text:style-name="P14">- All mermaid diagrams render cleanly in dark mode (no fixed colors, no syntax errors).</text:p>
      <text:p text:style-name="P14">- The component inventory table is complete and matches the diagram nodes 1:1.</text:p>
      <text:p text:style-name="P14">- The doc references back to the requirement document and CSV by relative lin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0T16:27:15.682782951</meta:creation-date>
    <dc:date>2026-05-11T10:15:43.977325153</dc:date>
    <meta:editing-duration>PT2M46S</meta:editing-duration>
    <meta:editing-cycles>1</meta:editing-cycles>
    <meta:document-statistic meta:table-count="0" meta:image-count="0" meta:object-count="0" meta:page-count="9" meta:paragraph-count="140" meta:word-count="2026" meta:character-count="14191" meta:non-whitespace-character-count="12239"/>
    <meta:generator>LibreOffice/24.2.7.2$Linux_X86_64 LibreOffice_project/420$Build-2</meta:generator>
  </office:meta>
</office:document-meta>
</file>